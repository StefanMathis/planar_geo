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tandard Symbols PS" svg:font-family="'Standard Symbols PS'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="Arrowheads_20_1" draw:marker-start-width="0.252cm" draw:marker-end-width="0.252cm" fo:padding-top="0.017cm" fo:padding-bottom="0.017cm" fo:padding-left="0.017cm" fo:padding-right="0.017cm" loext:decorative="false"/>
    </style:style>
    <style:style style:name="gr2" style:family="graphic" style:parent-style-name="objectwithoutfill">
      <style:graphic-properties svg:stroke-width="0.053cm" svg:stroke-color="#ff0000" draw:marker-start-width="0.279cm" draw:marker-end-width="0.279cm" draw:fill="none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47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2a6099" loext:opacity="100%" fo:font-size="12pt"/>
    </style:style>
    <style:style style:name="P4" style:family="paragraph">
      <loext:graphic-properties draw:fill="none" draw:fill-color="#ffffff"/>
      <style:paragraph-properties fo:text-align="center"/>
      <style:text-properties fo:color="#2a6099" loext:opacity="100%" fo:font-size="12pt"/>
    </style:style>
    <style:style style:name="T1" style:family="text">
      <style:text-properties style:font-name="Standard Symbols PS" style:font-name-asian="Standard Symbols PS" style:font-name-complex="Standard Symbols PS"/>
    </style:style>
    <style:style style:name="T2" style:family="text">
      <style:text-properties style:font-name="Liberation Sans" style:font-name-asian="Standard Symbols PS" style:font-name-complex="Standard Symbols P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6cm" svg:height="6cm" svg:x="1cm" svg:y="1cm" draw:kind="arc" draw:start-angle="45" draw:end-angle="315">
          <text:p/>
        </draw:circle>
        <draw:line draw:style-name="gr2" draw:text-style-name="P2" draw:layer="layout" svg:x1="4cm" svg:y1="0.8cm" svg:x2="4cm" svg:y2="1.2cm">
          <text:p/>
        </draw:line>
        <draw:line draw:style-name="gr2" draw:text-style-name="P2" draw:layer="layout" svg:x1="4cm" svg:y1="6.8cm" svg:x2="4cm" svg:y2="7.2cm">
          <text:p/>
        </draw:line>
        <draw:frame draw:style-name="gr3" draw:text-style-name="P4" draw:layer="layout" svg:width="4cm" svg:height="0.479cm" svg:x="2cm" svg:y="3.8cm">
          <draw:text-box>
            <text:p text:style-name="P3">Full arc: 45° <text:span text:style-name="T1">®</text:span><text:span text:style-name="T2"> 315°</text:span></text:p>
          </draw:text-box>
        </draw:frame>
        <draw:frame draw:style-name="gr3" draw:text-style-name="P4" draw:layer="layout" svg:width="4cm" svg:height="0.953cm" svg:x="4.6cm" svg:y="0.363cm">
          <draw:text-box>
            <text:p text:style-name="P3">Partial arc 1:<text:line-break/>45° <text:span text:style-name="T1">®</text:span><text:span text:style-name="T2"> </text:span><text:span text:style-name="T2">90°</text:span></text:p>
          </draw:text-box>
        </draw:frame>
        <draw:frame draw:style-name="gr3" draw:text-style-name="P4" draw:layer="layout" svg:width="4cm" svg:height="0.953cm" svg:x="-0.4cm" svg:y="0.364cm">
          <draw:text-box>
            <text:p text:style-name="P3">Partial arc 2:<text:line-break/>90° <text:span text:style-name="T1">®</text:span><text:span text:style-name="T2"> </text:span><text:span text:style-name="T2">270°</text:span></text:p>
          </draw:text-box>
        </draw:frame>
        <draw:frame draw:style-name="gr3" draw:text-style-name="P4" draw:layer="layout" svg:width="4cm" svg:height="0.953cm" svg:x="4.6cm" svg:y="6.7cm">
          <draw:text-box>
            <text:p text:style-name="P3">Partial arc 3:<text:line-break/>270° <text:span text:style-name="T1">®</text:span><text:span text:style-name="T2"> 315°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tandard Symbols PS" svg:font-family="'Standard Symbols P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1T09:34:03.882158956</meta:creation-date>
    <dc:date>2026-06-21T10:15:12.719957859</dc:date>
    <meta:editing-duration>PT14M22S</meta:editing-duration>
    <meta:editing-cycles>3</meta:editing-cycles>
    <meta:generator>LibreOffice/24.2.7.2$Linux_X86_64 LibreOffice_project/420$Build-2</meta:generator>
    <meta:document-statistic meta:object-count="7"/>
  </office:meta>
</office:document-meta>
</file>